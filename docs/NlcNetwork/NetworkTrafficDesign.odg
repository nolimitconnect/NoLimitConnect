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B600000200EC56699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2_20_Dots_20_3_20_Dashes" svg:stroke-width="0.035cm" svg:stroke-color="#00cc33" draw:marker-start-width="0.252cm" draw:marker-end-width="0.252cm" draw:stroke-linejoin="round" draw:fill-color="#ffffff" draw:textarea-vertical-align="top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Ultrafine_20_2_20_Dots_20_3_20_Dashes" svg:stroke-width="0.035cm" svg:stroke-color="#00cc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cc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Ultrafine_20_2_20_Dots_20_3_20_Dashes" svg:stroke-width="0.035cm" svg:stroke-color="#ff950e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Ultrafine_20_2_20_Dots_20_3_20_Dashes" svg:stroke-width="0.159cm" svg:stroke-color="#9999ff" draw:marker-start-width="0.438cm" draw:marker-end-width="0.438cm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0084d1" draw:marker-start="Arrow" draw:marker-start-width="0.438cm" draw:marker-end-width="0.438cm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fill-color="#ffffff" draw:textarea-vertical-align="top"/>
    </style:style>
    <style:style style:name="gr9" style:family="graphic" style:parent-style-name="objectwithoutfill">
      <style:graphic-properties draw:stroke="dash" draw:stroke-dash="Ultrafine_20_2_20_Dots_20_3_20_Dashes" svg:stroke-width="0.159cm" svg:stroke-color="#9999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159cm" svg:stroke-color="#0084d1" draw:marker-start="Arrow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draw:stroke="solid" svg:stroke-width="0.159cm" svg:stroke-color="#0084d1" draw:marker-start="Arrow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ff950e" draw:marker-start="Arrow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3" style:family="graphic" style:parent-style-name="objectwithoutfill">
      <style:graphic-properties draw:stroke="dash" draw:stroke-dash="Ultrafine_20_2_20_Dots_20_3_20_Dashes" svg:stroke-width="0.159cm" svg:stroke-color="#ff950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width="0.212cm" svg:stroke-color="#00cc00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stroke="dash" draw:stroke-dash="Ultrafine_20_2_20_Dots_20_3_20_Dashes" svg:stroke-width="0.159cm" svg:stroke-color="#9999ff" draw:marker-start="" draw:marker-start-width="0.538cm" draw:marker-end="" draw:marker-end-width="0.538cm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draw:stroke="solid" draw:stroke-dash="Ultrafine_20_2_20_Dots_20_3_20_Dashes" svg:stroke-width="0.159cm" svg:stroke-color="#0066cc" draw:marker-start="" draw:marker-start-width="0.538cm" draw:marker-end="" draw:marker-end-width="0.538cm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solid" draw:stroke-dash="Ultrafine_20_2_20_Dots_20_3_20_Dashes" svg:stroke-width="0.159cm" svg:stroke-color="#00cc00" draw:marker-start="" draw:marker-start-width="0.538cm" draw:marker-end="" draw:marker-end-width="0.538cm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solid" draw:stroke-dash="Ultrafine_20_2_20_Dots_20_3_20_Dashes" svg:stroke-width="0.159cm" svg:stroke-color="#ff950e" draw:marker-start="" draw:marker-start-width="0.538cm" draw:marker-end="" draw:marker-end-width="0.538cm" draw:textarea-vertical-align="middle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000000" draw:fill="none" draw:fill-color="#ffffff" fo:min-height="0.733cm"/>
    </style:style>
    <style:style style:name="gr20" style:family="graphic" style:parent-style-name="standard">
      <style:graphic-properties draw:stroke="none" svg:stroke-color="#000000" draw:fill="none" draw:fill-color="#ffffff" fo:min-height="0.5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11cm" svg:height="2.242cm" svg:x="7.346cm" svg:y="0.963cm">
          <draw:image xlink:href="Pictures/10000201000005B600000200EC56699C.png" xlink:type="simple" xlink:show="embed" xlink:actuate="onLoad">
            <text:p/>
          </draw:image>
        </draw:frame>
        <draw:rect draw:style-name="gr2" draw:text-style-name="P3" draw:layer="layout" svg:width="18.335cm" svg:height="3.39cm" draw:transform="skewX (-0.0003490658503988) translate (1.665cm 4.194cm)">
          <text:p text:style-name="P2"><text:span text:style-name="T1">Network Host Device</text:span></text:p>
          <text:p text:style-name="P2"><text:span text:style-name="T1"/></text:p>
        </draw:rect>
        <draw:rect draw:style-name="gr3" draw:text-style-name="P4" xml:id="id2" draw:id="id2" draw:layer="Boxes" svg:width="4.286cm" svg:height="0.931cm" svg:x="8.571cm" svg:y="6.428cm">
          <text:p text:style-name="P1"><text:span text:style-name="T1">Host List Service</text:span></text:p>
        </draw:rect>
        <draw:rect draw:style-name="gr4" draw:text-style-name="P4" xml:id="id4" draw:id="id4" draw:layer="Boxes" svg:width="6.373cm" svg:height="1.864cm" svg:x="1.889cm" svg:y="5.497cm">
          <text:p text:style-name="P1"><text:span text:style-name="T1">Connection Test Service</text:span></text:p>
          <text:p text:style-name="P1"><text:span text:style-name="T1">May be hosted on </text:span></text:p>
          <text:p text:style-name="P1"><text:span text:style-name="T1">a different device</text:span></text:p>
        </draw:rect>
        <draw:rect draw:style-name="gr5" draw:text-style-name="P4" draw:layer="Boxes" svg:width="6.596cm" svg:height="2.496cm" svg:x="13.156cm" svg:y="4.876cm">
          <text:p text:style-name="P1"><text:span text:style-name="T1">Optional Host Services</text:span></text:p>
          <text:p text:style-name="P1"><text:span text:style-name="T1">Group Host</text:span></text:p>
          <text:p text:style-name="P1"><text:span text:style-name="T1">Chat Room Host</text:span></text:p>
          <text:p text:style-name="P1"><text:span text:style-name="T1">Random Connect Host</text:span></text:p>
        </draw:rect>
        <draw:rect draw:style-name="gr4" draw:text-style-name="P4" xml:id="id1" draw:id="id1" draw:layer="Boxes" svg:width="6.372cm" svg:height="3.577cm" svg:x="11.615cm" svg:y="9.41cm">
          <text:p text:style-name="P1"><text:span text:style-name="T1">User Host Device</text:span></text:p>
          <text:p text:style-name="P1"><text:span text:style-name="T1">May host any or all of</text:span></text:p>
          <text:p text:style-name="P1"><text:span text:style-name="T1">Group Host</text:span></text:p>
          <text:p text:style-name="P1"><text:span text:style-name="T1">Chat Room Host</text:span></text:p>
          <text:p text:style-name="P1"><text:span text:style-name="T1">Random Connect Host</text:span></text:p>
        </draw:rect>
        <draw:connector draw:style-name="gr6" draw:text-style-name="P1" draw:layer="Boxes" draw:line-skew="-2.646cm" svg:x1="6.022cm" svg:y1="7.363cm" svg:x2="11.615cm" svg:y2="11.198cm" draw:end-shape="id1" svg:d="M6022 7363h-108v3835h5701">
          <text:p/>
        </draw:connector>
        <draw:connector draw:style-name="gr7" draw:text-style-name="P1" draw:layer="Boxes" svg:x1="10.714cm" svg:y1="7.359cm" svg:x2="14.801cm" svg:y2="9.41cm" draw:start-shape="id2" draw:end-shape="id1" svg:d="M10714 7359v1026h4087v1025">
          <text:p/>
        </draw:connector>
        <draw:rect draw:style-name="gr8" draw:text-style-name="P4" draw:layer="Boxes" svg:width="7.379cm" svg:height="3.391cm" svg:x="1.815cm" svg:y="17.422cm">
          <text:p text:style-name="P1"><text:span text:style-name="T1">User A</text:span></text:p>
        </draw:rect>
        <draw:rect draw:style-name="gr8" draw:text-style-name="P4" xml:id="id3" draw:id="id3" draw:layer="Boxes" svg:width="7.379cm" svg:height="3.429cm" svg:x="12.36cm" svg:y="17.384cm">
          <text:p text:style-name="P1"><text:span text:style-name="T1">User B</text:span></text:p>
        </draw:rect>
        <draw:line draw:style-name="gr9" draw:text-style-name="P1" draw:layer="Boxes" svg:x1="2.485cm" svg:y1="17.273cm" svg:x2="2.523cm" svg:y2="7.435cm">
          <text:p/>
        </draw:line>
        <draw:connector draw:style-name="gr6" draw:text-style-name="P1" draw:layer="Boxes" draw:line-skew="3.271cm" svg:x1="16.049cm" svg:y1="17.384cm" svg:x2="5.075cm" svg:y2="7.361cm" draw:start-shape="id3" draw:end-shape="id4" draw:end-glue-point="2" svg:d="M16049 17384v-1732h-10974v-8291">
          <text:p/>
        </draw:connector>
        <draw:line draw:style-name="gr10" draw:text-style-name="P1" draw:layer="Boxes" svg:x1="3.503cm" svg:y1="17.477cm" svg:x2="8.895cm" svg:y2="7.285cm">
          <text:p/>
        </draw:line>
        <draw:line draw:style-name="gr11" draw:text-style-name="P1" draw:layer="Boxes" svg:x1="12.954cm" svg:y1="17.422cm" svg:x2="9.265cm" svg:y2="7.36cm">
          <text:p/>
        </draw:line>
        <draw:line draw:style-name="gr12" draw:text-style-name="P1" draw:layer="Boxes" svg:x1="5.914cm" svg:y1="17.385cm" svg:x2="13.143cm" svg:y2="13.025cm">
          <text:p/>
        </draw:line>
        <draw:line draw:style-name="gr12" draw:text-style-name="P1" draw:layer="Boxes" svg:x1="16.273cm" svg:y1="12.988cm" svg:x2="18.323cm" svg:y2="17.422cm">
          <text:p/>
        </draw:line>
        <draw:line draw:style-name="gr13" draw:text-style-name="P1" draw:layer="Boxes" svg:x1="13.069cm" svg:y1="13.062cm" svg:x2="16.311cm" svg:y2="13.062cm">
          <text:p/>
        </draw:line>
        <draw:line draw:style-name="gr14" draw:text-style-name="P1" draw:layer="Boxes" svg:x1="9.043cm" svg:y1="18.988cm" svg:x2="12.509cm" svg:y2="18.988cm">
          <text:p/>
        </draw:line>
        <draw:line draw:style-name="gr15" draw:text-style-name="P1" draw:layer="Boxes" svg:x1="2.56cm" svg:y1="23.296cm" svg:x2="4.758cm" svg:y2="23.296cm">
          <text:p/>
        </draw:line>
        <draw:line draw:style-name="gr16" draw:text-style-name="P1" draw:layer="Boxes" svg:x1="2.535cm" svg:y1="24.242cm" svg:x2="4.733cm" svg:y2="24.242cm">
          <text:p/>
        </draw:line>
        <draw:line draw:style-name="gr17" draw:text-style-name="P1" draw:layer="Boxes" svg:x1="2.56cm" svg:y1="26.042cm" svg:x2="4.758cm" svg:y2="26.042cm">
          <text:p/>
        </draw:line>
        <draw:line draw:style-name="gr18" draw:text-style-name="P1" draw:layer="Boxes" svg:x1="2.56cm" svg:y1="25.136cm" svg:x2="4.758cm" svg:y2="25.136cm">
          <text:p/>
        </draw:line>
        <draw:frame draw:style-name="gr19" draw:text-style-name="P5" draw:layer="Boxes" svg:width="5.553cm" svg:height="0.983cm" svg:x="2.224cm" svg:y="21.931cm">
          <draw:text-box>
            <text:p><text:span text:style-name="T2">Legend</text:span></text:p>
          </draw:text-box>
        </draw:frame>
        <draw:frame draw:style-name="gr20" draw:text-style-name="P6" draw:layer="Boxes" svg:width="13.639cm" svg:height="0.82cm" svg:x="5.094cm" svg:y="22.837cm">
          <draw:text-box>
            <text:p><text:span text:style-name="T1">1. Test Internet Connection For Open Port</text:span></text:p>
          </draw:text-box>
        </draw:frame>
        <draw:frame draw:style-name="gr20" draw:text-style-name="P6" draw:layer="Boxes" svg:width="13.639cm" svg:height="0.82cm" svg:x="5.095cm" svg:y="23.737cm">
          <draw:text-box>
            <text:p><text:span text:style-name="T1">2. Host Announce And Host List Query</text:span></text:p>
          </draw:text-box>
        </draw:frame>
        <draw:frame draw:style-name="gr20" draw:text-style-name="P6" draw:layer="Boxes" svg:width="13.639cm" svg:height="0.82cm" svg:x="5.095cm" svg:y="24.637cm">
          <draw:text-box>
            <text:p><text:span text:style-name="T1">3. User Online Status And Relayed User Data Traffic</text:span></text:p>
          </draw:text-box>
        </draw:frame>
        <draw:frame draw:style-name="gr20" draw:text-style-name="P6" draw:layer="Boxes" svg:width="13.639cm" svg:height="0.82cm" svg:x="5.095cm" svg:y="25.637cm">
          <draw:text-box>
            <text:p><text:span text:style-name="T1">4. Person To Person Direct Connection Data Traffic</text:span></text:p>
          </draw:text-box>
        </draw:frame>
        <draw:frame draw:style-name="gr19" draw:text-style-name="P7" draw:layer="Boxes" svg:width="11.515cm" svg:height="0.983cm" svg:x="5.553cm" svg:y="3.205cm">
          <draw:text-box>
            <text:p text:style-name="P1"><text:span text:style-name="T2">No Limit Connect Network Traff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ox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 too</meta:initial-creator>
    <meta:creation-date>2023-09-25T05:50:00.96</meta:creation-date>
    <dc:date>2023-09-26T06:20:11.68</dc:date>
    <dc:creator>me too</dc:creator>
    <meta:editing-duration>PT23H41M39S</meta:editing-duration>
    <meta:editing-cycles>8</meta:editing-cycles>
    <meta:generator>OpenOffice/4.1.14$Win32 OpenOffice.org_project/4114m1$Build-9811</meta:generator>
    <meta:document-statistic meta:object-count="28"/>
  </office:meta>
</office:document-meta>
</file>